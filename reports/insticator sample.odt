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28AC45717F8931BED5E.png" manifest:media-type="image/png"/>
  <manifest:file-entry manifest:full-path="Pictures/100000000000027D0000028F6E8E106A48057AC1.png" manifest:media-type="image/png"/>
  <manifest:file-entry manifest:full-path="Pictures/10000000000002990000029DE690685AD6F998C5.png" manifest:media-type="image/png"/>
  <manifest:file-entry manifest:full-path="Pictures/100000000000027C0000029FA94D6C545FF59EBB.png" manifest:media-type="image/png"/>
  <manifest:file-entry manifest:full-path="Pictures/100000000000028600000296E3A23B036A09E3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0%"/>
      <style:text-properties fo:font-size="9pt" officeooo:rsid="00163a21" officeooo:paragraph-rsid="00163a21" style:font-size-asian="9pt" style:font-size-complex="9pt"/>
    </style:style>
    <style:style style:name="P2" style:family="paragraph" style:parent-style-name="Standard">
      <style:paragraph-properties fo:line-height="80%" fo:break-before="page"/>
      <style:text-properties fo:font-size="9pt" officeooo:rsid="00163a21" officeooo:paragraph-rsid="00163a21" style:font-size-asian="9pt" style:font-size-complex="9pt"/>
    </style:style>
    <style:style style:name="P3" style:family="paragraph" style:parent-style-name="Standard">
      <style:paragraph-properties fo:line-height="80%"/>
      <style:text-properties fo:font-size="9pt" officeooo:rsid="00163a21" officeooo:paragraph-rsid="00163a21" style:font-size-asian="9pt" style:font-size-complex="9pt"/>
    </style:style>
    <style:style style:name="P4" style:family="paragraph" style:parent-style-name="Preformatted_20_Text">
      <style:paragraph-properties fo:line-height="90%"/>
      <style:text-properties fo:font-size="10.3999996185303pt" officeooo:rsid="00163a21" officeooo:paragraph-rsid="00163a21" style:font-size-asian="9pt" style:font-size-complex="9pt"/>
    </style:style>
    <style:style style:name="P5" style:family="paragraph" style:parent-style-name="Preformatted_20_Text">
      <style:paragraph-properties fo:margin-top="0in" fo:margin-bottom="0in" loext:contextual-spacing="false" fo:line-height="90%" fo:padding="0in" fo:border="none"/>
      <style:text-properties style:font-name="Ubuntu Mono" fo:font-size="10.3999996185303pt"/>
    </style:style>
    <style:style style:name="P6" style:family="paragraph" style:parent-style-name="Preformatted_20_Text">
      <style:paragraph-properties fo:margin-top="0in" fo:margin-bottom="0in" loext:contextual-spacing="false" fo:line-height="90%" fo:padding="0in" fo:border="none"/>
    </style:style>
    <style:style style:name="P7" style:family="paragraph" style:parent-style-name="Preformatted_20_Text">
      <style:paragraph-properties fo:margin-top="0in" fo:margin-bottom="0in" loext:contextual-spacing="false" fo:line-height="90%" fo:padding="0in" fo:border="none"/>
      <style:text-properties fo:font-size="10.3999996185303pt"/>
    </style:style>
    <style:style style:name="T1" style:family="text">
      <style:text-properties fo:color="#0000ff"/>
    </style:style>
    <style:style style:name="T2" style:family="text">
      <style:text-properties fo:color="#0000ff" style:font-name="Ubuntu Mono"/>
    </style:style>
    <style:style style:name="T3" style:family="text">
      <style:text-properties style:font-name="Ubuntu Mono"/>
    </style:style>
    <style:style style:name="T4" style:family="text">
      <style:text-properties style:font-name="Ubuntu Mono" fo:font-size="10.399999618530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764in" svg:y="-0.0583in" svg:width="2.7791in" svg:height="2.7409in" draw:z-index="0"><draw:image xlink:href="Pictures/10000000000002930000028AC45717F8931BED5E.png" xlink:type="simple" xlink:show="embed" xlink:actuate="onLoad"/></draw:frame><draw:frame draw:style-name="fr1" draw:name="Image2" text:anchor-type="paragraph" svg:x="3.7693in" svg:y="-0.172in" svg:width="2.7299in" svg:height="2.8071in" draw:z-index="1"><draw:image xlink:href="Pictures/100000000000027D0000028F6E8E106A48057AC1.png" xlink:type="simple" xlink:show="embed" xlink:actuate="onLoad"/></draw:frame><draw:frame draw:style-name="fr1" draw:name="Image3" text:anchor-type="paragraph" svg:x="3.9008in" svg:y="2.739in" svg:width="2.6819in" svg:height="2.8291in" draw:z-index="2"><draw:image xlink:href="Pictures/100000000000027C0000029FA94D6C545FF59EBB.png" xlink:type="simple" xlink:show="embed" xlink:actuate="onLoad"/></draw:frame><draw:frame draw:style-name="fr1" draw:name="Image4" text:anchor-type="paragraph" svg:x="0.1173in" svg:y="2.8965in" svg:width="2.8299in" svg:height="2.8992in" draw:z-index="3"><draw:image xlink:href="Pictures/100000000000028600000296E3A23B036A09E337.png" xlink:type="simple" xlink:show="embed" xlink:actuate="onLoad"/></draw:frame><draw:frame draw:style-name="fr1" draw:name="Image5" text:anchor-type="paragraph" svg:x="1.4102in" svg:y="5.8591in" svg:width="3.6516in" svg:height="3.6728in" draw:z-index="4"><draw:image xlink:href="Pictures/10000000000002990000029DE690685AD6F998C5.png" xlink:type="simple" xlink:show="embed" xlink:actuate="onLoad"/></draw:frame></text:p>
      <text:p text:style-name="P2">head(BJsales)</text:p>
      <text:p text:style-name="P1">mpBJs&lt;- BJsales[-nrow(BJsales),]</text:p>
      <text:p text:style-name="P1"/>
      <text:p text:style-name="P1">newRow &lt;- data.frame(X1=0,time=150,BJsales=0)</text:p>
      <text:p text:style-name="P1">tmpBJs &lt;- rbind(tmpBJs,newRow)</text:p>
      <text:p text:style-name="P1"/>
      <text:p text:style-name="P1">par(mfrow=c(1, 2)) <text:s/># divide graph area in 2 columns</text:p>
      <text:p text:style-name="P1">scatter.smooth(x=tmpBJs$BJsales, y=tmpBJs$X1, main="Linear Regression on X1 ~ BJsales") <text:s/># scatterplot</text:p>
      <text:p text:style-name="P1">scatter.smooth(x=BJsales$BJsales, y=BJsales$X1, main="X1 ~ BJsales") <text:s/># scatterplot</text:p>
      <text:p text:style-name="P1"/>
      <text:p text:style-name="P1">par(mfrow=c(1, 2)) <text:s/># divide graph area in 2 columns</text:p>
      <text:p text:style-name="P1">boxplot(tmpBJs$BJsales, main="Sales", sub=paste("Outlier rows: ", boxplot.stats(tmpBJs$BJsales)$out)) <text:s/># box plot for 'Sales'</text:p>
      <text:p text:style-name="P1">boxplot(tmpBJs$X1, main="X1", sub=paste("Outlier rows: ", boxplot.stats(tmpBJs$X1)$out)) <text:s/># box plot for 'X1'</text:p>
      <text:p text:style-name="P1"/>
      <text:p text:style-name="P1">install.packages("e1071")</text:p>
      <text:p text:style-name="P1">library(e1071)</text:p>
      <text:p text:style-name="P1">par(mfrow=c(1, 2)) <text:s/># divide graph area in 2 columns</text:p>
      <text:p text:style-name="P1">plot(density(tmpBJs$BJsales), main="Density Plot: Sales", ylab="Frequency", sub=paste("Skewness:", round(e1071::skewness(tmpBJs$BJsales), 2))) <text:s/># density plot for 'Sales'</text:p>
      <text:p text:style-name="P1">polygon(density(tmpBJs$BJsales), col="red")</text:p>
      <text:p text:style-name="P1">plot(density(tmpBJs$X1), main="Density Plot: X1", ylab="Frequency", sub=paste("Skewness:", round(e1071::skewness(tmpBJs$X1), 2))) <text:s/># density plot for 'dist'</text:p>
      <text:p text:style-name="P1">polygon(density(tmpBJs$X1), col="red")</text:p>
      <text:p text:style-name="P1"/>
      <text:p text:style-name="P1">cor(tmpBJs$BJsales, tmpBJs$X1) <text:s/># calculate correlation between speed and distance </text:p>
      <text:p text:style-name="P1">#&gt; [1] 0.8068949</text:p>
      <text:p text:style-name="P1"/>
      <text:p text:style-name="P1">linearMod &lt;- lm(X1 ~ BJsales, data=BJsales) <text:s/># build linear regression model on full data</text:p>
      <text:p text:style-name="P1">print(linearMod)</text:p>
      <text:p text:style-name="P1">summary(linearMod) <text:s/># model summary</text:p>
      <text:p text:style-name="P1"/>
      <text:p text:style-name="P1">modelSummary &lt;- summary(linearMod) <text:s/># capture model summary as an object</text:p>
      <text:p text:style-name="P1">modelCoeffs &lt;- modelSummary$coefficients <text:s/># model coefficients</text:p>
      <text:p text:style-name="P1">beta.estimate &lt;- modelCoeffs["BJsales", "Estimate"] <text:s/># get beta estimate for speed</text:p>
      <text:p text:style-name="P1">std.error &lt;- modelCoeffs["BJsales", "Std. Error"] <text:s/># get std.error for speed</text:p>
      <text:p text:style-name="P1">t_value &lt;- beta.estimate/std.error <text:s/># calc t statistic</text:p>
      <text:p text:style-name="P1">p_value &lt;- 2*pt(-abs(t_value), df=nrow(BJsales)-ncol(BJsales)) <text:s/># calc p Value</text:p>
      <text:p text:style-name="P1">f_statistic &lt;- linearMod$fstatistic[1] <text:s/># fstatistic</text:p>
      <text:p text:style-name="P1">f &lt;- summary(linearMod)$fstatistic <text:s/># parameters for model p-value calc</text:p>
      <text:p text:style-name="P1">model_p &lt;- pf(f[1], f[2], f[3], lower=FALSE)</text:p>
      <text:p text:style-name="P1"/>
      <text:p text:style-name="P1">AIC(linearMod) <text:s/># AIC =&gt; 419.1569</text:p>
      <text:p text:style-name="P1">BIC(linearMod) <text:s/># BIC =&gt; 424.8929</text:p>
      <text:p text:style-name="P1">#---------------------------------------------------------------------------------------------</text:p>
      <text:p text:style-name="P1"># Create Training and Test data -</text:p>
      <text:p text:style-name="P1">trainingRowIndex &lt;- sample(1:nrow(BJsales), 0.8*nrow(BJsales)) <text:s/># row indices for training data</text:p>
      <text:p text:style-name="P1">trainingData &lt;- BJsales[trainingRowIndex, ] <text:s/># model training data</text:p>
      <text:p text:style-name="P1">testData <text:s/>&lt;- BJsales[-trainingRowIndex, ] <text:s text:c="2"/># test data</text:p>
      <text:p text:style-name="P1"/>
      <text:p text:style-name="P1"># Build the model on training data -</text:p>
      <text:p text:style-name="P1">lmMod &lt;- lm(X1 ~ BJsales, data=trainingData) <text:s/># build the model</text:p>
      <text:p text:style-name="P1">x1Pred &lt;- predict(lmMod, testData) <text:s/># predict distance</text:p>
      <text:p text:style-name="P1">summary (lmMod) <text:s/># model summary</text:p>
      <text:p text:style-name="P1">AIC (lmMod)</text:p>
      <text:p text:style-name="P1"/>
      <text:p text:style-name="P1">actuals_preds &lt;- data.frame(cbind(actuals=testData$X1, predicted=x1Pred)) <text:s/># make actuals_predicteds dataframe.</text:p>
      <text:p text:style-name="P1">correlation_accuracy &lt;- cor(actuals_preds) <text:s/># 82.7%</text:p>
      <text:p text:style-name="P1">head(actuals_preds)</text:p>
      <text:p text:style-name="P1"/>
      <text:p text:style-name="P1">min_max_accuracy &lt;- mean(apply(actuals_preds, 1, min) / apply(actuals_preds, 1, max)) <text:s/></text:p>
      <text:p text:style-name="P1"># =&gt; 58.42%, min_max accuracy</text:p>
      <text:p text:style-name="P1">mape &lt;- mean(abs((actuals_preds$predicteds - actuals_preds$actuals))/actuals_preds$actuals)</text:p>
      <text:p text:style-name="P1"/>
      <text:p text:style-name="P1">install.packages("DAAG")</text:p>
      <text:p text:style-name="P1">library(DAAG)</text:p>
      <text:p text:style-name="P1">cvResults &lt;- suppressWarnings(CVlm(form.lm=X1 ~ BJsales, data =BJsales, m=5, dots=FALSE, seed=5, legend.pos="topleft", <text:s/>printit=FALSE, main="Small symbols are predicted values while bigger ones are actuals.")); <text:s/># performs the CV</text:p>
      <text:p text:style-name="P1"/>
      <text:p text:style-name="P1">par(mfrow=c(1, 3)) <text:s/># divide graph area in 2 columns</text:p>
      <text:p text:style-name="P1">scatter.smooth(x=tmpBJs$BJsales, y=tmpBJs$X1, main="Linear Regression on X1 ~ BJsales") <text:s/># scatterplot</text:p>
      <text:p text:style-name="P1">scatter.smooth(x=BJsales$BJsales, y=BJsales$X1, main="X1 ~ BJsales") <text:s/># scatterplot</text:p>
      <text:p text:style-name="P1">cvResults &lt;- suppressWarnings(CVlm(form.lm=X1 ~ BJsales, data =BJsales, m=5, dots=FALSE, seed=5, legend.pos="topleft", <text:s/>printit=FALSE, main="Small symbols are predicted values while bigger ones are actuals.")); <text:s/># performs the CV</text:p>
      <text:p text:style-name="P1"/>
      <text:p text:style-name="P1"/>
      <text:p text:style-name="P1">attr(cvResults, 'ms') <text:s/># =&gt; 251.2783 mean squared error</text:p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1">
        <text:p text:style-name="P4"><text:bookmark text:name="rstudio_console_output"/><text:soft-page-break/><text:span text:style-name="T2">&gt; attr(cvResults, 'ms') <text:s/># =&gt; 251.2783 mean sq </text:span></text:p>
        <text:p text:style-name="P5">[1] 344.7871</text:p>
        <text:p text:style-name="P5"><text:span text:style-name="T1">&gt; print(cvResults)</text:span></text:p>
        <text:p text:style-name="P6"><text:s text:c="5"/><text:span text:style-name="T4">X1 time BJsales Predicted <text:s text:c="3"/>cvpred</text:span></text:p>
        <text:p text:style-name="P5">1 <text:s text:c="4"/>1 <text:s text:c="3"/>1 <text:s text:c="2"/>200.1 <text:s/>20.86650 <text:s/>20.71434</text:p>
        <text:p text:style-name="P5">2 <text:s text:c="4"/>2 <text:s text:c="3"/>2 <text:s text:c="2"/>199.5 <text:s/>19.76937 <text:s/>20.39664</text:p>
        <text:p text:style-name="P5">3 <text:s text:c="4"/>3 <text:s text:c="3"/>3 <text:s text:c="2"/>199.4 <text:s/>19.58651 <text:s/>19.43100</text:p>
        <text:p text:style-name="P5">4 <text:s text:c="4"/>4 <text:s text:c="3"/>4 <text:s text:c="2"/>198.9 <text:s/>18.67224 <text:s/>18.02686</text:p>
        <text:p text:style-name="P5">5 <text:s text:c="4"/>5 <text:s text:c="3"/>5 <text:s text:c="2"/>199.0 <text:s/>18.85509 <text:s/>18.69767</text:p>
        <text:p text:style-name="P5">6 <text:s text:c="4"/>6 <text:s text:c="3"/>6 <text:s text:c="2"/>200.2 <text:s/>21.04935 <text:s/>20.39943</text:p>
        <text:p text:style-name="P5">7 <text:s text:c="4"/>7 <text:s text:c="3"/>7 <text:s text:c="2"/>198.6 <text:s/>18.12367 <text:s/>17.47934</text:p>
        <text:p text:style-name="P5">8 <text:s text:c="4"/>8 <text:s text:c="3"/>8 <text:s text:c="2"/>200.0 <text:s/>20.68364 <text:s/>20.53101</text:p>
        <text:p text:style-name="P5">9 <text:s text:c="4"/>9 <text:s text:c="3"/>9 <text:s text:c="2"/>200.3 <text:s/>21.23221 <text:s/>21.85875</text:p>
        <text:p text:style-name="P5">10 <text:s text:c="2"/>10 <text:s text:c="2"/>10 <text:s text:c="2"/>201.2 <text:s/>22.87791 <text:s/>22.73102</text:p>
        <text:p text:style-name="P5">11 <text:s text:c="2"/>11 <text:s text:c="2"/>11 <text:s text:c="2"/>201.6 <text:s/>23.60933 <text:s/>24.30564</text:p>
        <text:p text:style-name="P5">12 <text:s text:c="2"/>12 <text:s text:c="2"/>12 <text:s text:c="2"/>201.5 <text:s/>23.42647 <text:s/>24.12376</text:p>
        <text:p text:style-name="P5">13 <text:s text:c="2"/>13 <text:s text:c="2"/>13 <text:s text:c="2"/>201.5 <text:s/>23.42647 <text:s/>24.12376</text:p>
        <text:p text:style-name="P5">14 <text:s text:c="2"/>14 <text:s text:c="2"/>14 <text:s text:c="2"/>203.5 <text:s/>27.08358 <text:s/>27.76147</text:p>
        <text:p text:style-name="P5">15 <text:s text:c="2"/>15 <text:s text:c="2"/>15 <text:s text:c="2"/>204.9 <text:s/>29.64355 <text:s/>29.51438</text:p>
        <text:p text:style-name="P5">16 <text:s text:c="2"/>16 <text:s text:c="2"/>16 <text:s text:c="2"/>207.1 <text:s/>33.66637 <text:s/>34.28673</text:p>
        <text:p text:style-name="P5">17 <text:s text:c="2"/>17 <text:s text:c="2"/>17 <text:s text:c="2"/>210.5 <text:s/>39.88345 <text:s/>39.19749</text:p>
        <text:p text:style-name="P5">18 <text:s text:c="2"/>18 <text:s text:c="2"/>18 <text:s text:c="2"/>210.5 <text:s/>39.88345 <text:s/>40.49347</text:p>
        <text:p text:style-name="P5">19 <text:s text:c="2"/>19 <text:s text:c="2"/>19 <text:s text:c="2"/>209.8 <text:s/>38.60346 <text:s/>39.22027</text:p>
        <text:p text:style-name="P5">20 <text:s text:c="2"/>20 <text:s text:c="2"/>20 <text:s text:c="2"/>208.8 <text:s/>36.77491 <text:s/>36.66441</text:p>
        <text:p text:style-name="P5">21 <text:s text:c="2"/>21 <text:s text:c="2"/>21 <text:s text:c="2"/>209.5 <text:s/>38.05490 <text:s/>38.67307</text:p>
        <text:p text:style-name="P5">22 <text:s text:c="2"/>22 <text:s text:c="2"/>22 <text:s text:c="2"/>213.2 <text:s/>44.82054 <text:s/>45.43535</text:p>
        <text:p text:style-name="P5">23 <text:s text:c="2"/>23 <text:s text:c="2"/>23 <text:s text:c="2"/>213.7 <text:s/>45.73482 <text:s/>45.36998</text:p>
        <text:p text:style-name="P5">24 <text:s text:c="2"/>24 <text:s text:c="2"/>24 <text:s text:c="2"/>215.1 <text:s/>48.29479 <text:s/>48.86021</text:p>
        <text:p text:style-name="P5">25 <text:s text:c="2"/>25 <text:s text:c="2"/>25 <text:s text:c="2"/>218.7 <text:s/>54.87758 <text:s/>55.48740</text:p>
        <text:p text:style-name="P5">26 <text:s text:c="2"/>26 <text:s text:c="2"/>26 <text:s text:c="2"/>219.8 <text:s/>56.88899 <text:s/>56.56531</text:p>
        <text:p text:style-name="P5">27 <text:s text:c="2"/>27 <text:s text:c="2"/>27 <text:s text:c="2"/>220.5 <text:s/>58.16898 <text:s/>57.85002</text:p>
        <text:p text:style-name="P5">28 <text:s text:c="2"/>28 <text:s text:c="2"/>28 <text:s text:c="2"/>223.8 <text:s/>64.20320 <text:s/>64.80838</text:p>
        <text:p text:style-name="P5">29 <text:s text:c="2"/>29 <text:s text:c="2"/>29 <text:s text:c="2"/>222.8 <text:s/>62.37465 <text:s/>62.33119</text:p>
        <text:p text:style-name="P5">30 <text:s text:c="2"/>30 <text:s text:c="2"/>30 <text:s text:c="2"/>223.8 <text:s/>64.20320 <text:s/>63.90650</text:p>
        <text:p text:style-name="P5">31 <text:s text:c="2"/>31 <text:s text:c="2"/>31 <text:s text:c="2"/>221.7 <text:s/>60.36324 <text:s/>60.86467</text:p>
        <text:p text:style-name="P5">32 <text:s text:c="2"/>32 <text:s text:c="2"/>32 <text:s text:c="2"/>222.3 <text:s/>61.46037 <text:s/>62.06691</text:p>
        <text:p text:style-name="P5">33 <text:s text:c="2"/>33 <text:s text:c="2"/>33 <text:s text:c="2"/>220.8 <text:s/>58.71754 <text:s/>59.32545</text:p>
        <text:p text:style-name="P5">34 <text:s text:c="2"/>34 <text:s text:c="2"/>34 <text:s text:c="2"/>219.4 <text:s/>56.15757 <text:s/>56.68130</text:p>
        <text:p text:style-name="P5">35 <text:s text:c="2"/>35 <text:s text:c="2"/>35 <text:s text:c="2"/>220.1 <text:s/>57.43756 <text:s/>56.71802</text:p>
        <text:p text:style-name="P5">36 <text:s text:c="2"/>36 <text:s text:c="2"/>36 <text:s text:c="2"/>220.6 <text:s/>58.35183 <text:s/>57.63055</text:p>
        <text:p text:style-name="P5">37 <text:s text:c="2"/>37 <text:s text:c="2"/>37 <text:s text:c="2"/>218.9 <text:s/>55.24329 <text:s/>55.85292</text:p>
        <text:p text:style-name="P5">38 <text:s text:c="2"/>38 <text:s text:c="2"/>38 <text:s text:c="2"/>217.8 <text:s/>53.23188 <text:s/>53.77113</text:p>
        <text:p text:style-name="P5">39 <text:s text:c="2"/>39 <text:s text:c="2"/>39 <text:s text:c="2"/>217.7 <text:s/>53.04903 <text:s/>52.71118</text:p>
        <text:p text:style-name="P5">40 <text:s text:c="2"/>40 <text:s text:c="2"/>40 <text:s text:c="2"/>215.0 <text:s/>48.11194 <text:s/>47.41024</text:p>
        <text:p text:style-name="P5">41 <text:s text:c="2"/>41 <text:s text:c="2"/>41 <text:s text:c="2"/>215.3 <text:s/>48.66050 <text:s/>48.30646</text:p>
        <text:p text:style-name="P5">42 <text:s text:c="2"/>42 <text:s text:c="2"/>42 <text:s text:c="2"/>215.9 <text:s/>49.75763 <text:s/>49.68113</text:p>
        <text:p text:style-name="P5">43 <text:s text:c="2"/>43 <text:s text:c="2"/>43 <text:s text:c="2"/>216.7 <text:s/>51.22048 <text:s/>50.87588</text:p>
        <text:p text:style-name="P5">44 <text:s text:c="2"/>44 <text:s text:c="2"/>44 <text:s text:c="2"/>216.7 <text:s/>51.22048 <text:s/>51.83211</text:p>
        <text:p text:style-name="P5">45 <text:s text:c="2"/>45 <text:s text:c="2"/>45 <text:s text:c="2"/>217.7 <text:s/>53.04903 <text:s/>53.58924</text:p>
        <text:p text:style-name="P5">46 <text:s text:c="2"/>46 <text:s text:c="2"/>46 <text:s text:c="2"/>218.7 <text:s/>54.87758 <text:s/>54.16294</text:p>
        <text:p text:style-name="P5">47 <text:s text:c="2"/>47 <text:s text:c="2"/>47 <text:s text:c="2"/>222.9 <text:s/>62.55750 <text:s/>62.25473</text:p>
        <text:p text:style-name="P5">48 <text:s text:c="2"/>48 <text:s text:c="2"/>48 <text:s text:c="2"/>224.9 <text:s/>66.21461 <text:s/>66.81879</text:p>
        <text:p text:style-name="P5">49 <text:s text:c="2"/>49 <text:s text:c="2"/>49 <text:s text:c="2"/>222.2 <text:s/>61.27752 <text:s/>61.23118</text:p>
        <text:p text:style-name="P5">50 <text:s text:c="2"/>50 <text:s text:c="2"/>50 <text:s text:c="2"/>220.7 <text:s/>58.53469 <text:s/>59.04581</text:p>
        <text:p text:style-name="P5">51 <text:s text:c="2"/>51 <text:s text:c="2"/>51 <text:s text:c="2"/>220.0 <text:s/>57.25470 <text:s/>56.93237</text:p>
        <text:p text:style-name="P5">52 <text:s text:c="2"/>52 <text:s text:c="2"/>52 <text:s text:c="2"/>218.7 <text:s/>54.87758 <text:s/>54.54648</text:p>
        <text:p text:style-name="P5">53 <text:s text:c="2"/>53 <text:s text:c="2"/>53 <text:s text:c="2"/>217.0 <text:s/>51.76904 <text:s/>51.69781</text:p>
        <text:p text:style-name="P5">54 <text:s text:c="2"/>54 <text:s text:c="2"/>54 <text:s text:c="2"/>215.9 <text:s/>49.75763 <text:s/>49.40764</text:p>
        <text:p text:style-name="P5">55 <text:s text:c="2"/>55 <text:s text:c="2"/>55 <text:s text:c="2"/>215.8 <text:s/>49.57478 <text:s/>50.18723</text:p>
        <text:p text:style-name="P5">56 <text:s text:c="2"/>56 <text:s text:c="2"/>56 <text:s text:c="2"/>214.1 <text:s/>46.46624 <text:s/>45.76769</text:p>
        <text:p text:style-name="P5">57 <text:s text:c="2"/>57 <text:s text:c="2"/>57 <text:s text:c="2"/>212.3 <text:s/>43.17484 <text:s/>42.80057</text:p>
        <text:p text:style-name="P5">58 <text:s text:c="2"/>58 <text:s text:c="2"/>58 <text:s text:c="2"/>213.9 <text:s/>46.10053 <text:s/>46.67759</text:p>
        <text:p text:style-name="P5">59 <text:s text:c="2"/>59 <text:s text:c="2"/>59 <text:s text:c="2"/>214.6 <text:s/>47.38052 <text:s/>47.95079</text:p>
        <text:p text:style-name="P5">60 <text:s text:c="2"/>60 <text:s text:c="2"/>60 <text:s text:c="2"/>213.6 <text:s/>45.55196 <text:s/>46.16641</text:p>
        <text:p text:style-name="P5">61 <text:s text:c="2"/>61 <text:s text:c="2"/>61 <text:s text:c="2"/>212.1 <text:s/>42.80913 <text:s/>42.71444</text:p>
        <text:p text:style-name="P5">62 <text:s text:c="2"/>62 <text:s text:c="2"/>62 <text:s text:c="2"/>211.4 <text:s/>41.52915 <text:s/>41.43110</text:p>
        <text:p text:style-name="P5">63 <text:s text:c="2"/>63 <text:s text:c="2"/>63 <text:s text:c="2"/>213.1 <text:s/>44.63769 <text:s/>43.94263</text:p>
        <text:p text:style-name="P5">64 <text:s text:c="2"/>64 <text:s text:c="2"/>64 <text:s text:c="2"/>212.9 <text:s/>44.27198 <text:s/>43.57762</text:p>
        <text:p text:style-name="P5">65 <text:s text:c="2"/>65 <text:s text:c="2"/>65 <text:s text:c="2"/>213.3 <text:s/>45.00340 <text:s/>44.63586</text:p>
        <text:p text:style-name="P5">66 <text:s text:c="2"/>66 <text:s text:c="2"/>66 <text:s text:c="2"/>211.5 <text:s/>41.71200 <text:s/>41.61443</text:p>
        <text:p text:style-name="P5">67 <text:s text:c="2"/>67 <text:s text:c="2"/>67 <text:s text:c="2"/>212.3 <text:s/>43.17484 <text:s/>42.80057</text:p>
        <text:p text:style-name="P5">68 <text:s text:c="2"/>68 <text:s text:c="2"/>68 <text:s text:c="2"/>213.0 <text:s/>44.45483 <text:s/>45.04061</text:p>
        <text:p text:style-name="P5">69 <text:s text:c="2"/>69 <text:s text:c="2"/>69 <text:s text:c="2"/>211.0 <text:s/>40.79772 <text:s/>41.41454</text:p>
        <text:p text:style-name="P5">70 <text:s text:c="2"/>70 <text:s text:c="2"/>70 <text:s text:c="2"/>210.7 <text:s/>40.24916 <text:s/>39.56250</text:p>
        <text:p text:style-name="P5">71 <text:s text:c="2"/>71 <text:s text:c="2"/>71 <text:s text:c="2"/>210.1 <text:s/>39.15203 <text:s/>38.76291</text:p>
        <text:p text:style-name="P5">72 <text:s text:c="2"/>72 <text:s text:c="2"/>72 <text:s text:c="2"/>211.4 <text:s/>41.52915 <text:s/>41.43110</text:p>
        <text:p text:style-name="P5">73 <text:s text:c="2"/>73 <text:s text:c="2"/>73 <text:s text:c="2"/>210.0 <text:s/>38.96917 <text:s/>39.58689</text:p>
        <text:p text:style-name="P5">74 <text:s text:c="2"/>74 <text:s text:c="2"/>74 <text:s text:c="2"/>209.7 <text:s/>38.42061 <text:s/>38.02879</text:p>
        <text:p text:style-name="P5">75 <text:s text:c="2"/>75 <text:s text:c="2"/>75 <text:s text:c="2"/>208.8 <text:s/>36.77491 <text:s/>36.66441</text:p>
        <text:p text:style-name="P5">76 <text:s text:c="2"/>76 <text:s text:c="2"/>76 <text:s text:c="2"/>208.8 <text:s/>36.77491 <text:s/>37.40141</text:p>
        <text:p text:style-name="P5">77 <text:s text:c="2"/>77 <text:s text:c="2"/>77 <text:s text:c="2"/>208.8 <text:s/>36.77491 <text:s/>37.39372</text:p>
        <text:p text:style-name="P5">78 <text:s text:c="2"/>78 <text:s text:c="2"/>78 <text:s text:c="2"/>210.6 <text:s/>40.06630 <text:s/>40.67536</text:p>
        <text:p text:style-name="P5">79 <text:s text:c="2"/>79 <text:s text:c="2"/>79 <text:s text:c="2"/>211.9 <text:s/>42.44342 <text:s/>41.75257</text:p>
        <text:p text:style-name="P5">80 <text:s text:c="2"/>80 <text:s text:c="2"/>80 <text:s text:c="2"/>212.8 <text:s/>44.08912 <text:s/>44.70430</text:p>
        <text:p text:style-name="P5">81 <text:s text:c="2"/>81 <text:s text:c="2"/>81 <text:s text:c="2"/>212.5 <text:s/>43.54055 <text:s/>43.44777</text:p>
        <text:p text:style-name="P5">82 <text:s text:c="2"/>82 <text:s text:c="2"/>82 <text:s text:c="2"/>214.8 <text:s/>47.74623 <text:s/>48.31456</text:p>
        <text:p text:style-name="P5">83 <text:s text:c="2"/>83 <text:s text:c="2"/>83 <text:s text:c="2"/>215.3 <text:s/>48.66050 <text:s/>48.30646</text:p>
        <text:p text:style-name="P5">84 <text:s text:c="2"/>84 <text:s text:c="2"/>84 <text:s text:c="2"/>217.5 <text:s/>52.68332 <text:s/>51.97288</text:p>
        <text:p text:style-name="P5">85 <text:s text:c="2"/>85 <text:s text:c="2"/>85 <text:s text:c="2"/>218.8 <text:s/>55.06044 <text:s/>54.34545</text:p>
        <text:p text:style-name="P5">86 <text:s text:c="2"/>86 <text:s text:c="2"/>86 <text:s text:c="2"/>220.7 <text:s/>58.53469 <text:s/>57.81305</text:p>
        <text:p text:style-name="P5">87 <text:s text:c="2"/>87 <text:s text:c="2"/>87 <text:s text:c="2"/>222.2 <text:s/>61.27752 <text:s/>61.88415</text:p>
        <text:p text:style-name="P5">88 <text:s text:c="2"/>88 <text:s text:c="2"/>88 <text:s text:c="2"/>226.7 <text:s/>69.50600 <text:s/>69.22887</text:p>
        <text:p text:style-name="P5">89 <text:s text:c="2"/>89 <text:s text:c="2"/>89 <text:s text:c="2"/>228.4 <text:s/>72.61454 <text:s/>72.59790</text:p>
        <text:p text:style-name="P5">90 <text:s text:c="2"/>90 <text:s text:c="2"/>90 <text:s text:c="2"/>233.2 <text:s/>81.39160 <text:s/>81.98823</text:p>
        <text:p text:style-name="P5">91 <text:s text:c="2"/>91 <text:s text:c="2"/>91 <text:s text:c="2"/>235.7 <text:s/>85.96298 <text:s/>86.55734</text:p>
        <text:p text:style-name="P5">92 <text:s text:c="2"/>92 <text:s text:c="2"/>92 <text:s text:c="2"/>237.1 <text:s/>88.52295 <text:s/>88.31598</text:p>
        <text:p text:style-name="P5">93 <text:s text:c="2"/>93 <text:s text:c="2"/>93 <text:s text:c="2"/>240.6 <text:s/>94.92289 <text:s/>94.96466</text:p>
        <text:p text:style-name="P5">94 <text:s text:c="2"/>94 <text:s text:c="2"/>94 <text:s text:c="2"/>243.8 100.77426 100.83136</text:p>
        <text:p text:style-name="P5">95 <text:s text:c="2"/>95 <text:s text:c="2"/>95 <text:s text:c="2"/>245.3 103.51709 102.70940</text:p>
        <text:p text:style-name="P5">96 <text:s text:c="2"/>96 <text:s text:c="2"/>96 <text:s text:c="2"/>246.0 104.79707 104.86471</text:p>
        <text:p text:style-name="P5">97 <text:s text:c="2"/>97 <text:s text:c="2"/>97 <text:s text:c="2"/>246.3 105.34564 105.93036</text:p>
        <text:p text:style-name="P5">98 <text:s text:c="2"/>98 <text:s text:c="2"/>98 <text:s text:c="2"/>247.7 107.90561 108.15496</text:p>
        <text:p text:style-name="P5">99 <text:s text:c="2"/>99 <text:s text:c="2"/>99 <text:s text:c="2"/>247.6 107.72276 107.97307</text:p>
        <text:p text:style-name="P5">100 100 <text:s/>100 <text:s text:c="2"/>247.8 108.08847 108.33684</text:p>
        <text:p text:style-name="P5">101 101 <text:s/>101 <text:s text:c="2"/>249.4 111.01415 110.19212</text:p>
        <text:p text:style-name="P5">102 102 <text:s/>102 <text:s text:c="2"/>249.0 110.28273 109.46210</text:p>
        <text:p text:style-name="P5">103 103 <text:s/>103 <text:s text:c="2"/>249.9 111.92843 112.50988</text:p>
        <text:p text:style-name="P5">104 104 <text:s/>104 <text:s text:c="2"/>250.5 113.02556 113.60646</text:p>
        <text:p text:style-name="P5">105 105 <text:s/>105 <text:s text:c="2"/>251.5 114.85411 114.74428</text:p>
        <text:p text:style-name="P5">106 106 <text:s/>106 <text:s text:c="2"/>249.0 110.28273 109.46210</text:p>
        <text:p text:style-name="P5">107 107 <text:s/>107 <text:s text:c="2"/>247.6 107.72276 107.58662</text:p>
        <text:p text:style-name="P5">108 108 <text:s/>108 <text:s text:c="2"/>248.8 109.91702 110.15570</text:p>
        <text:p text:style-name="P5">109 109 <text:s/>109 <text:s text:c="2"/>250.4 112.84271 113.06587</text:p>
        <text:p text:style-name="P5">110 110 <text:s/>110 <text:s text:c="2"/>250.7 113.39127 113.48141</text:p>
        <text:p text:style-name="P5">111 111 <text:s/>111 <text:s text:c="2"/>253.0 117.59694 117.79490</text:p>
        <text:p text:style-name="P5">112 112 <text:s/>112 <text:s text:c="2"/>253.7 118.87693 118.03986</text:p>
        <text:p text:style-name="P5">113 113 <text:s/>113 <text:s text:c="2"/>255.0 121.25405 121.16783</text:p>
        <text:p text:style-name="P5">114 114 <text:s/>114 <text:s text:c="2"/>256.2 123.44831 123.37019</text:p>
        <text:p text:style-name="P5">115 115 <text:s/>115 <text:s text:c="2"/>256.0 123.08260 122.23749</text:p>
        <text:p text:style-name="P5">116 116 <text:s/>116 <text:s text:c="2"/>257.4 125.64257 126.21721</text:p>
        <text:p text:style-name="P5">117 117 <text:s/>117 <text:s text:c="2"/>260.4 131.12823 131.25444</text:p>
        <text:p text:style-name="P5">118 118 <text:s/>118 <text:s text:c="2"/>260.0 130.39681 129.53771</text:p>
        <text:p text:style-name="P5">119 119 <text:s/>119 <text:s text:c="2"/>261.3 132.77393 132.91483</text:p>
        <text:p text:style-name="P5">120 120 <text:s/>120 <text:s text:c="2"/>260.4 131.12823 131.26482</text:p>
        <text:p text:style-name="P5">121 121 <text:s/>121 <text:s text:c="2"/>261.6 133.32250 133.89331</text:p>
        <text:p text:style-name="P5">122 122 <text:s/>122 <text:s text:c="2"/>260.8 131.85965 130.99775</text:p>
        <text:p text:style-name="P5">123 123 <text:s/>123 <text:s text:c="2"/>259.8 130.03110 129.97726</text:p>
        <text:p text:style-name="P5">124 124 <text:s/>124 <text:s text:c="2"/>259.0 128.56826 128.69814</text:p>
        <text:p text:style-name="P5">125 125 <text:s/>125 <text:s text:c="2"/>258.9 128.38540 128.32549</text:p>
        <text:p text:style-name="P5">126 126 <text:s/>126 <text:s text:c="2"/>257.4 125.64257 125.76480</text:p>
        <text:p text:style-name="P5">127 127 <text:s/>127 <text:s text:c="2"/>257.7 126.19114 126.76550</text:p>
        <text:p text:style-name="P5">128 128 <text:s/>128 <text:s text:c="2"/>257.9 126.55685 126.70730</text:p>
        <text:p text:style-name="P5">129 129 <text:s/>129 <text:s text:c="2"/>257.4 125.64257 125.57255</text:p>
        <text:p text:style-name="P5">130 130 <text:s/>130 <text:s text:c="2"/>257.3 125.45972 125.61599</text:p>
        <text:p text:style-name="P5">131 131 <text:s/>131 <text:s text:c="2"/>257.6 126.00829 126.13147</text:p>
        <text:p text:style-name="P5">132 132 <text:s/>132 <text:s text:c="2"/>258.9 128.38540 128.51481</text:p>
        <text:p text:style-name="P5">133 133 <text:s/>133 <text:s text:c="2"/>257.8 126.37400 126.49813</text:p>
        <text:p text:style-name="P5">134 134 <text:s/>134 <text:s text:c="2"/>257.7 126.19114 126.76550</text:p>
        <text:p text:style-name="P5">135 135 <text:s/>135 <text:s text:c="2"/>257.2 125.27686 125.43410</text:p>
        <text:p text:style-name="P5">136 136 <text:s/>136 <text:s text:c="2"/>257.5 125.82543 126.39997</text:p>
        <text:p text:style-name="P5">137 137 <text:s/>137 <text:s text:c="2"/>256.8 124.54544 125.12062</text:p>
        <text:p text:style-name="P5">138 138 <text:s/>138 <text:s text:c="2"/>257.5 125.82543 125.75608</text:p>
        <text:p text:style-name="P5">139 139 <text:s/>139 <text:s text:c="2"/>257.0 124.91115 124.06254</text:p>
        <text:p text:style-name="P5">140 140 <text:s/>140 <text:s text:c="2"/>257.6 126.00829 126.16164</text:p>
        <text:p text:style-name="P5">141 141 <text:s/>141 <text:s text:c="2"/>257.3 125.45972 124.61006</text:p>
        <text:p text:style-name="P5">142 142 <text:s/>142 <text:s text:c="2"/>257.5 125.82543 124.97507</text:p>
        <text:p text:style-name="P5">143 143 <text:s/>143 <text:s text:c="2"/>259.6 129.66539 129.61020</text:p>
        <text:p text:style-name="P5">144 144 <text:s/>144 <text:s text:c="2"/>261.1 132.40822 131.54527</text:p>
        <text:p text:style-name="P5">145 145 <text:s/>145 <text:s text:c="2"/>262.9 135.69962 134.83036</text:p>
        <text:p text:style-name="P5">146 146 <text:s/>146 <text:s text:c="2"/>263.3 136.43104 136.58151</text:p>
        <text:p text:style-name="P5">147 147 <text:s/>147 <text:s text:c="2"/>262.8 135.51676 135.61970</text:p>
        <text:p text:style-name="P5">148 148 <text:s/>148 <text:s text:c="2"/>261.8 133.68821 133.64786</text:p>
        <text:p text:style-name="P5">149 149 <text:s/>149 <text:s text:c="2"/>262.2 134.41963 134.38198</text:p>
        <text:p text:style-name="P7"><text:span text:style-name="T3">150 150 <text:s/>150 <text:s text:c="2"/>262.7 135.33390 134.46535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65in" fo:margin-bottom="0.520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2:38:51.339310911</meta:creation-date>
    <meta:print-date>2017-08-31T12:51:14.834640207</meta:print-date>
    <dc:date>2017-09-06T00:26:37.177530291</dc:date>
    <meta:editing-duration>PT5M35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3" meta:paragraph-count="211" meta:word-count="1322" meta:character-count="9868" meta:non-whitespace-character-count="7744"/>
  </office:meta>
</office:document-meta>
</file>